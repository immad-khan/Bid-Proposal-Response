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0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rfp-proposal-engine (Root) </text:p>
      <text:p text:style-name="P1">│ </text:p>
      <text:p text:style-name="P1">├── .gitignore </text:p>
      <text:p text:style-name="P1">├── docker-compose.yml <text:s text:c="9"/>(include services: net-api, ai-engine, frontend, chromadb, neo4j, redis, elasticsearch) </text:p>
      <text:p text:style-name="P1">├── README.md </text:p>
      <text:p text:style-name="P1">├── .env.example <text:s text:c="15"/>(template for all env vars) </text:p>
      <text:p text:style-name="P1">│ </text:p>
      <text:p text:style-name="P1">├── /backend-net (.NET 10 API) </text:p>
      <text:p text:style-name="P1">│ <text:s text:c="2"/>├── Controllers/ </text:p>
      <text:p text:style-name="P1">│ <text:s text:c="2"/>├── Services/ <text:s text:c="14"/>(Auth, Blob storage, project management) </text:p>
      <text:p text:style-name="P1">│ <text:s text:c="2"/>├── Models/ <text:s text:c="16"/>(DTOs shared with ai-engine) </text:p>
      <text:p text:style-name="P1">│ <text:s text:c="2"/>├── Program.cs </text:p>
      <text:p text:style-name="P1">│ <text:s text:c="2"/>└── appsettings.json </text:p>
      <text:p text:style-name="P1">│ ├── /ai-engine (FastAPI + LangGraph) </text:p>
      <text:p text:style-name="P1">│ <text:s text:c="2"/>├── agents/ │</text:p>
      <text:p text:style-name="P1">│ <text:s text:c="2"/>├── planner.py │</text:p>
      <text:p text:style-name="P1">│ <text:s text:c="2"/>├── writer.py │</text:p>
      <text:p text:style-name="P1">│ <text:s text:c="2"/>├── gatekeeper.py │</text:p>
      <text:p text:style-name="P1">│ <text:s text:c="2"/>├── judge.py <text:s text:c="11"/>(NEW – LLM Judge) </text:p>
      <text:p text:style-name="P1">│ <text:s text:c="2"/>│ <text:s text:c="2"/>└── state.py <text:s text:c="11"/>(LangGraph state definitions) </text:p>
      <text:p text:style-name="P1">│ <text:s text:c="2"/>├── routes/ <text:s text:c="16"/>(FastAPI endpoints) </text:p>
      <text:p text:style-name="P1">│ <text:s text:c="2"/>├── schemas/ <text:s text:c="15"/>(Pydantic models, shared with backend-net) </text:p>
      <text:p text:style-name="P1">│ <text:s text:c="2"/>├── services/ │</text:p>
      <text:p text:style-name="P1">│ <text:s text:c="2"/>├── parser_service.py <text:s text:c="2"/>(Docling + PDFPlumber ensemble) </text:p>
      <text:p text:style-name="P1">│ <text:s text:c="2"/>│ <text:s text:c="2"/>├── chunking_service.py (hierarchical parent-child) </text:p>
      <text:p text:style-name="P1">│ <text:s text:c="2"/>│ <text:s text:c="2"/>├── retrieval_service.py (hybrid search: semantic + BM25 + RRF + reranker) </text:p>
      <text:p text:style-name="P1">│ <text:s text:c="2"/>│ <text:s text:c="2"/>├── vector_store.py <text:s text:c="4"/>(ChromaDB client) </text:p>
      <text:p text:style-name="P1">│ <text:s text:c="2"/>│ <text:s text:c="2"/>├── bm25_index.py <text:s text:c="6"/>(BM25 wrapper, could use Elasticsearch or in‑memory) </text:p>
      <text:p text:style-name="P1">│ <text:s text:c="2"/>│ <text:s text:c="2"/>├── reranker.py <text:s text:c="8"/>(cross‑encoder model loading) </text:p>
      <text:p text:style-name="P1"><text:soft-page-break/>│ <text:s text:c="2"/>│ <text:s text:c="2"/>├── compliance_matrix.py (Neo4j client) </text:p>
      <text:p text:style-name="P1">│ <text:s text:c="2"/>│ <text:s text:c="2"/>├── go_nogo_engine.py <text:s text:c="2"/>(NEW – scikit‑learn + SHAP) </text:p>
      <text:p text:style-name="P1">│ <text:s text:c="2"/>│ <text:s text:c="2"/>└── llm_client.py <text:s text:c="6"/>(wrapper for Groq/OpenAI/Anthropic) </text:p>
      <text:p text:style-name="P1">│ <text:s text:c="2"/>├── models/ <text:s text:c="16"/>(local ML models: cross‑encoder, embeddings) </text:p>
      <text:p text:style-name="P1">│ <text:s text:c="2"/>├── main.py │ <text:s text:c="2"/>├── requirements.txt </text:p>
      <text:p text:style-name="P1">│ <text:s text:c="2"/>└── tests/ <text:s text:c="17"/>(NEW – unit/integration tests) </text:p>
      <text:p text:style-name="P1">│ ├── /frontend (React / Next.js) </text:p>
      <text:p text:style-name="P1">│ <text:s text:c="2"/>├── app/ <text:s text:c="19"/>(App Router) </text:p>
      <text:p text:style-name="P1">│ <text:s text:c="2"/>├── components/ │</text:p>
      <text:p text:style-name="P1">│ <text:s text:c="2"/>├── dashboard/ │</text:p>
      <text:p text:style-name="P1">│ <text:s text:c="2"/>├── editor/ │</text:p>
      <text:p text:style-name="P1">│ <text:s text:c="2"/>├── compliance_matrix/ </text:p>
      <text:p text:style-name="P1">│ <text:s text:c="2"/>│ <text:s text:c="2"/>└── workspace/ </text:p>
      <text:p text:style-name="P1">│ <text:s text:c="2"/>├── hooks/ </text:p>
      <text:p text:style-name="P1">│ <text:s text:c="2"/>├── services/ <text:s text:c="14"/>(API client calling backend-net) </text:p>
      <text:p text:style-name="P1">│ <text:s text:c="2"/>├── styles/ </text:p>
      <text:p text:style-name="P1">│ <text:s text:c="2"/>└── package.json </text:p>
      <text:p text:style-name="P1">│ ├── /infrastructure <text:s text:c="12"/>(NEW – for local dev &amp; deployment) </text:p>
      <text:p text:style-name="P1">│ <text:s text:c="2"/>├── docker/ </text:p>
      <text:p text:style-name="P1">│ <text:s text:c="2"/>│ <text:s text:c="2"/>├── chromadb.Dockerfile </text:p>
      <text:p text:style-name="P1">│ <text:s text:c="2"/>│ <text:s text:c="2"/>├── neo4j.Dockerfile </text:p>
      <text:p text:style-name="P1">│ <text:s text:c="2"/>│ <text:s text:c="2"/>└── elasticsearch.Dockerfile </text:p>
      <text:p text:style-name="P1">│ <text:s text:c="2"/>└── scripts/ </text:p>
      <text:p text:style-name="P1">│ <text:s text:c="6"/>├── init-neo4j.cql </text:p>
      <text:p text:style-name="P1">│ <text:s text:c="6"/>└── init-es.sh </text:p>
      <text:p text:style-name="P1">│ └── /notebooks <text:s text:c="17"/>(NEW – evaluation and debugging) </text:p>
      <text:p text:style-name="P1">├── retrieval_accuracy.ipynb </text:p>
      <text:p text:style-name="P1">└── compliance_scoring.ipynb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00:10:51.553545894</meta:creation-date>
    <dc:date>2026-06-12T00:16:18.141619697</dc:date>
    <meta:editing-duration>PT5M27S</meta:editing-duration>
    <meta:editing-cycles>1</meta:editing-cycles>
    <meta:document-statistic meta:table-count="0" meta:image-count="0" meta:object-count="0" meta:page-count="2" meta:paragraph-count="57" meta:word-count="288" meta:character-count="2278" meta:non-whitespace-character-count="1642"/>
    <meta:generator>LibreOffice/26.2.4.2$Linux_X86_64 LibreOffice_project/0229ac93fcf0d7cbc6376066c6f35021cef002dc</meta:generator>
  </office:meta>
</office:document-meta>
</file>